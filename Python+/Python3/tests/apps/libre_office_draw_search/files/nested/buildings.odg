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62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371cm" fo:min-width="6.24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Accommodation" draw:style-name="dp1" draw:master-page-name="Default">
        <draw:custom-shape draw:style-name="gr1" draw:text-style-name="P2" draw:layer="layout" svg:width="4.128cm" svg:height="2.54cm" svg:x="3.222cm" svg:y="3.54cm">
          <text:p text:style-name="P1">Hous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cm" svg:height="3.493cm" svg:x="3.54cm" svg:y="8.302cm">
          <text:p text:style-name="P1">Apartment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</draw:page>
      <draw:page draw:name="Furniture" draw:style-name="dp1" draw:master-page-name="Default">
        <draw:connector draw:style-name="gr3" draw:text-style-name="P1" draw:layer="layout" svg:x1="3.528cm" svg:y1="5.574cm" svg:x2="10.937cm" svg:y2="5.574cm" svg:d="M3528 5574h7409" svg:viewBox="0 0 7410 1">
          <text:p text:style-name="P1">chair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9T08:56:58.860228263</meta:creation-date>
    <dc:date>2025-05-09T08:58:34.760759294</dc:date>
    <meta:editing-duration>PT1M34S</meta:editing-duration>
    <meta:editing-cycles>4</meta:editing-cycles>
    <meta:generator>LibreOffice/26.2.4.2$Linux_X86_64 LibreOffice_project/620$Build-2</meta:generator>
    <meta:document-statistic meta:object-count="3"/>
  </office:meta>
</office:document-meta>
</file>