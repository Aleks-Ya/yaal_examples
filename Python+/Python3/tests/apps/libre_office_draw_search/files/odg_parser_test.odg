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358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41cm" fo:min-width="1.644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8.073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3.31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972cm" fo:min-width="7.12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 First" draw:style-name="dp1" draw:master-page-name="Default">
        <draw:custom-shape draw:style-name="gr1" draw:text-style-name="P2" draw:layer="layout" svg:width="2.858cm" svg:height="1.27cm" svg:x="3.222cm" svg:y="3.54cm">
          <text:p text:style-name="P1">Ca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587cm" svg:x="3.54cm" svg:y="6.715cm">
          <text:p text:style-name="P1">Dog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custom-shape draw:style-name="gr1" draw:text-style-name="P2" draw:layer="layout" svg:width="2.858cm" svg:height="1.27cm" svg:x="3.857cm" svg:y="10.525cm">
          <text:p text:style-name="P1">русский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573cm" svg:height="1.27cm" svg:x="3.857cm" svg:y="13.7cm">
          <text:p text:style-name="P1">Разный Регистр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1.905cm" svg:x="2.587cm" svg:y="16.557cm">
          <text:p text:style-name="P1">Перенос</text:p>
          <text:p text:style-name="P1">Строки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62cm" svg:height="2.222cm" svg:x="5.445cm" svg:y="21.32cm">
          <text:p text:style-name="P3"><text:span text:style-name="T1">SpanTex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9T06:00:52.762448047</meta:creation-date>
    <meta:generator>LibreOffice/26.2.4.2$Linux_X86_64 LibreOffice_project/620$Build-2</meta:generator>
    <dc:date>2025-05-09T10:15:42.752973047</dc:date>
    <meta:editing-duration>PT5M14S</meta:editing-duration>
    <meta:editing-cycles>9</meta:editing-cycles>
    <meta:document-statistic meta:object-count="6"/>
  </office:meta>
</office:document-meta>
</file>