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43cm" fo:min-width="3.627cm" style:writing-mode="lr-tb" loext:decorative="false"/>
      <style:paragraph-properties style:writing-mode="lr-tb"/>
    </style:style>
    <style:style style:name="gr2" style:family="graphic" style:parent-style-name="My_20_Style_20_1">
      <style:graphic-properties draw:textarea-vertical-align="middle" draw:auto-grow-height="false" fo:min-height="3.243cm" fo:min-width="3.62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127cm" svg:height="3.493cm" svg:x="2.27cm" svg:y="2.587cm">
          <text:p text:style-name="P1">Default Drawing Styl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127cm" svg:height="3.493cm" svg:x="6.08cm" svg:y="7.35cm">
          <text:p text:style-name="P3">My Style 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08cm" svg:y1="9.096cm" svg:x2="4.333cm" svg:y2="6.08cm" draw:start-shape="id1" draw:start-glue-point="3" draw:end-shape="id2" draw:end-glue-point="2" svg:d="M6080 9096h-1747v-3016" svg:viewBox="0 0 1748 301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y_20_Style_20_1" style:display-name="My Style 1" style:family="graphic" style:parent-style-name="standard">
      <style:graphic-properties draw:stroke-dash="Dash_20_Dot_20_4" draw:fill="solid" draw:fill-color="#c5000b" draw:fill-gradient-name="Gradient_20_1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8T22:54:53.911723078</meta:creation-date>
    <dc:date>2026-06-19T05:11:52.651070690</dc:date>
    <meta:editing-duration>PT1M10S</meta:editing-duration>
    <meta:editing-cycles>3</meta:editing-cycles>
    <meta:generator>LibreOffice/26.2.4.2$Linux_X86_64 LibreOffice_project/620$Build-2</meta:generator>
    <meta:document-statistic meta:object-count="3"/>
  </office:meta>
</office:document-meta>
</file>