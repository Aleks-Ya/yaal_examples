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3.628cm" loext:decorative="false"/>
      <style:paragraph-properties style:writing-mode="lr-tb"/>
    </style:style>
    <style:style style:name="gr2" style:family="graphic" style:parent-style-name="My_20_Style_20_1">
      <style:graphic-properties draw:textarea-vertical-align="middle" draw:auto-grow-height="false" fo:min-height="2.925cm" fo:min-width="3.628cm" loext:decorative="false"/>
      <style:paragraph-properties style:writing-mode="lr-tb"/>
    </style:style>
    <style:style style:name="gr3" style:family="graphic" style:parent-style-name="My_20_Style_20_2">
      <style:graphic-properties draw:textarea-vertical-align="middle" draw:auto-grow-height="false" fo:min-height="2.925cm" fo:min-width="3.628cm" loext:decorative="false"/>
      <style:paragraph-properties style:writing-mode="lr-tb"/>
    </style:style>
    <style:style style:name="gr4" style:family="graphic" style:parent-style-name="My_20_Style_20_3">
      <style:graphic-properties draw:textarea-vertical-align="middle" draw:auto-grow-height="false" fo:min-height="2.925cm" fo:min-width="3.628cm" loext:decorative="false"/>
      <style:paragraph-properties style:writing-mode="lr-tb"/>
    </style:style>
    <style:style style:name="gr5" style:family="graphic" style:parent-style-name="My_20_Style_20_4">
      <style:graphic-properties draw:textarea-vertical-align="middle" draw:auto-grow-height="false" fo:min-height="2.925cm" fo:min-width="3.628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28cm" svg:height="3.175cm" svg:x="2.269cm" svg:y="2.27cm">
          <text:p text:style-name="P1">Default Drawing Styl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128cm" svg:height="3.175cm" svg:x="6.08cm" svg:y="7.032cm">
          <text:p text:style-name="P1">My Style 1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128cm" svg:height="3.175cm" svg:x="10.207cm" svg:y="11.477cm">
          <text:p text:style-name="P1">My Style 2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128cm" svg:height="3.175cm" svg:x="14.335cm" svg:y="15.605cm">
          <text:p text:style-name="P1">My Style 3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128cm" svg:height="3.175cm" svg:x="14.335cm" svg:y="19.732cm">
          <text:p text:style-name="P1">My Style 4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08cm" svg:y1="8.619cm" svg:x2="4.333cm" svg:y2="5.445cm" draw:start-shape="id1" draw:start-glue-point="3" draw:end-shape="id2" draw:end-glue-point="2" svg:d="M6080 8619h-1747v-3174" svg:viewBox="0 0 1748 3175">
          <text:p/>
        </draw:connector>
        <draw:connector draw:style-name="gr6" draw:text-style-name="P1" draw:layer="layout" svg:x1="10.207cm" svg:y1="13.064cm" svg:x2="8.144cm" svg:y2="10.207cm" draw:start-shape="id3" draw:start-glue-point="3" draw:end-shape="id1" draw:end-glue-point="2" svg:d="M10207 13064h-2063v-2857" svg:viewBox="0 0 2064 2858">
          <text:p/>
        </draw:connector>
        <draw:connector draw:style-name="gr6" draw:text-style-name="P1" draw:layer="layout" svg:x1="14.335cm" svg:y1="17.192cm" svg:x2="12.271cm" svg:y2="14.652cm" draw:start-shape="id4" draw:start-glue-point="3" draw:end-shape="id3" svg:d="M14335 17192h-2064v-2540" svg:viewBox="0 0 2065 2541">
          <text:p/>
        </draw:connector>
        <draw:connector draw:style-name="gr6" draw:text-style-name="P1" draw:layer="layout" svg:x1="14.335cm" svg:y1="21.319cm" svg:x2="12.271cm" svg:y2="14.652cm" draw:start-shape="id5" draw:start-glue-point="3" draw:end-shape="id3" draw:end-glue-point="2" svg:d="M14335 21319h-2064v-6667" svg:viewBox="0 0 2065 666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y_20_Style_20_1" style:display-name="My Style 1" style:family="graphic" style:parent-style-name="standard">
      <style:graphic-properties draw:stroke-dash="Dash_20_Dot_20_4" draw:fill="solid" draw:fill-color="#579d1c" draw:fill-gradient-name="Gradient_20_1" draw:fill-hatch-name="Red_20_90_20_Degrees_20_Crossed_20_1" draw:fill-image-name="Bitmap_20_1"/>
    </style:style>
    <style:style style:name="My_20_Style_20_2" style:display-name="My Style 2" style:family="graphic" style:parent-style-name="My_20_Style_20_1">
      <style:graphic-properties draw:fill="solid" draw:fill-color="#ffd320"/>
    </style:style>
    <style:style style:name="My_20_Style_20_3" style:display-name="My Style 3" style:family="graphic" style:parent-style-name="My_20_Style_20_2">
      <style:graphic-properties draw:fill="solid" draw:fill-color="#ff420e"/>
    </style:style>
    <style:style style:name="My_20_Style_20_4" style:display-name="My Style 4" style:family="graphic" style:parent-style-name="My_20_Style_20_2">
      <style:graphic-properties draw:fill="solid" draw:fill-color="#0084d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22:50:57.611304914</meta:creation-date>
    <dc:date>2026-06-18T22:54:45.154350187</dc:date>
    <meta:editing-duration>PT3M48S</meta:editing-duration>
    <meta:editing-cycles>1</meta:editing-cycles>
    <meta:generator>LibreOffice/26.2.4.2$Linux_X86_64 LibreOffice_project/620$Build-2</meta:generator>
    <meta:document-statistic meta:object-count="9"/>
  </office:meta>
</office:document-meta>
</file>