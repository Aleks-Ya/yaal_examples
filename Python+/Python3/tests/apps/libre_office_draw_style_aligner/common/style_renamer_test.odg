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MyStyleNew">
      <style:graphic-properties draw:textarea-vertical-align="middle" draw:auto-grow-height="false" fo:min-height="1.973cm" fo:min-width="3.31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223cm" svg:x="3.857cm" svg:y="1.9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yStyleNew" style:display-name="My Style Old" style:family="graphic" style:parent-style-name="standard">
      <style:graphic-properties draw:stroke-dash="Dash_20_Dot_20_4" draw:fill="solid" draw:fill-color="#ff420e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5T22:24:31.574426385</meta:creation-date>
    <dc:date>2026-06-15T22:25:57.726332118</dc:date>
    <meta:editing-duration>PT1M27S</meta:editing-duration>
    <meta:editing-cycles>1</meta:editing-cycles>
    <meta:document-statistic meta:object-count="1"/>
    <meta:generator>odfdo 3.22.8</meta:generator>
  </office:meta>
</office:document-meta>
</file>