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  <style:paragraph-properties style:writing-mode="lr-tb"/>
    </style:style>
    <style:style style:name="gr4" style:family="graphic" style:parent-style-name="My_20_style_20_1">
      <style:graphic-properties draw:textarea-vertical-align="middle" draw:auto-grow-height="false" fo:min-height="1.338cm" fo:min-width="2.357cm" style:writing-mode="lr-tb" loext:decorative="false"/>
      <style:paragraph-properties style:writing-mode="lr-tb"/>
    </style:style>
    <style:style style:name="gr5" style:family="graphic" style:parent-style-name="My_20_Hidden_20_Style">
      <style:graphic-properties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 One" draw:style-name="dp1" draw:master-page-name="Default">
        <draw:custom-shape draw:style-name="gr1" draw:text-style-name="P2" draw:layer="layout" svg:width="3.81cm" svg:height="1.27cm" svg:x="3.222cm" svg:y="1.952cm">
          <text:p text:style-name="P1">Hello Worl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 Two" draw:style-name="dp1" draw:master-page-name="Default">
        <draw:custom-shape draw:style-name="gr2" draw:text-style-name="P2" xml:id="id1" draw:id="id1" draw:layer="layout" svg:width="3.81cm" svg:height="1.27cm" svg:x="3.222cm" svg:y="1.952cm">
          <text:p text:style-name="P1">Bye Worl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3.222cm" svg:y="4.175cm">
          <text:p text:style-name="P1">take ca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27cm" svg:y1="3.222cm" svg:x2="5.127cm" svg:y2="4.175cm" draw:start-shape="id1" draw:start-glue-point="2" draw:end-shape="id2" draw:end-glue-point="0" svg:d="M5127 3222v953" svg:viewBox="0 0 1 954">
          <text:p text:style-name="P1">see you</text:p>
        </draw:connector>
      </draw:page>
      <draw:page draw:name="My styles" draw:style-name="dp1" draw:master-page-name="Default">
        <draw:custom-shape draw:style-name="gr4" draw:text-style-name="P2" draw:layer="layout" svg:width="2.857cm" svg:height="1.588cm" svg:x="3.54cm" svg:y="2.587cm">
          <text:p text:style-name="P1">Styled Tex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2.54cm" svg:x="3.222cm" svg:y="7.985cm">
          <text:p>My hidden sty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_20_Hidden_20_Style" style:display-name="My Hidden Style" style:family="graphic" style:parent-style-name="standard">
      <style:graphic-properties draw:stroke-dash="Dash_20_Dot_20_4" draw:fill="solid" draw:fill-color="#ffff38" draw:fill-gradient-name="Gradient_20_1" draw:fill-hatch-name="Red_20_90_20_Degrees_20_Crossed_20_1" draw:fill-image-name="Bitmap_20_1" draw:textarea-vertical-align="middle" draw:auto-grow-height="false" fo:min-height="2.29cm" fo:min-width="5.215cm"/>
      <style:paragraph-properties fo:text-align="center"/>
      <style:text-properties fo:background-color="#bbe33d"/>
    </style:style>
    <style:style style:name="My_20_style_20_1" style:display-name="My style 1" style:family="graphic" style:parent-style-name="standard">
      <style:graphic-properties draw:stroke-dash="Dash_20_Dot_20_4" draw:fill="gradient" draw:fill-color="#729fcf" draw:fill-gradient-name="Pastel_20_Bouquet" draw:gradient-step-count="0"/>
      <style:text-properties fo:color="#468a1a" loext:opacity="100%" fo:font-weight="bold" style:font-size-asian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08:20:56.227010793</meta:creation-date>
    <dc:date>2026-06-12T20:58:04.559946464</dc:date>
    <meta:editing-duration>PT56M25S</meta:editing-duration>
    <meta:editing-cycles>14</meta:editing-cycles>
    <meta:generator>LibreOffice/26.2.4.2$Linux_X86_64 LibreOffice_project/620$Build-2</meta:generator>
    <meta:document-statistic meta:object-count="6"/>
  </office:meta>
</office:document-meta>
</file>